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3d87c5" officeooo:paragraph-rsid="003d87c5"/>
    </style:style>
    <style:style style:name="P2" style:family="paragraph" style:parent-style-name="Standard" style:list-style-name="L1">
      <style:text-properties officeooo:paragraph-rsid="0011cdda"/>
    </style:style>
    <style:style style:name="P3" style:family="paragraph" style:parent-style-name="Standard" style:list-style-name="L1">
      <style:text-properties officeooo:rsid="0020fe63" officeooo:paragraph-rsid="0020fe63"/>
    </style:style>
    <style:style style:name="P4" style:family="paragraph" style:parent-style-name="Standard" style:list-style-name="L1">
      <style:text-properties officeooo:rsid="0013fb8c" officeooo:paragraph-rsid="0029956f"/>
    </style:style>
    <style:style style:name="P5" style:family="paragraph" style:parent-style-name="Standard" style:list-style-name="L1">
      <style:text-properties officeooo:rsid="0014da12" officeooo:paragraph-rsid="0014da12"/>
    </style:style>
    <style:style style:name="P6" style:family="paragraph" style:parent-style-name="Standard" style:list-style-name="L1">
      <style:text-properties officeooo:rsid="00198b87" officeooo:paragraph-rsid="00198b87"/>
    </style:style>
    <style:style style:name="P7" style:family="paragraph" style:parent-style-name="Standard" style:list-style-name="L1">
      <style:text-properties officeooo:paragraph-rsid="002b10af"/>
    </style:style>
    <style:style style:name="P8" style:family="paragraph" style:parent-style-name="Standard" style:list-style-name="L1">
      <style:text-properties officeooo:rsid="0017ca88" officeooo:paragraph-rsid="0017ca88"/>
    </style:style>
    <style:style style:name="P9" style:family="paragraph" style:parent-style-name="Standard" style:list-style-name="L1">
      <style:text-properties officeooo:rsid="002d46dd" officeooo:paragraph-rsid="002d46dd"/>
    </style:style>
    <style:style style:name="P10" style:family="paragraph" style:parent-style-name="Standard" style:list-style-name="L1">
      <style:text-properties officeooo:rsid="002fbb87" officeooo:paragraph-rsid="002fbb87"/>
    </style:style>
    <style:style style:name="P11" style:family="paragraph" style:parent-style-name="Standard" style:list-style-name="L1">
      <style:text-properties officeooo:rsid="0019c37a" officeooo:paragraph-rsid="0019c37a"/>
    </style:style>
    <style:style style:name="P12" style:family="paragraph" style:parent-style-name="Standard" style:list-style-name="L1">
      <style:text-properties officeooo:rsid="003172f4" officeooo:paragraph-rsid="003172f4"/>
    </style:style>
    <style:style style:name="P13" style:family="paragraph" style:parent-style-name="Standard" style:list-style-name="L1">
      <style:text-properties officeooo:rsid="00150316" officeooo:paragraph-rsid="002fbb87"/>
    </style:style>
    <style:style style:name="P14" style:family="paragraph" style:parent-style-name="Standard" style:list-style-name="L1">
      <style:text-properties officeooo:rsid="00150316" officeooo:paragraph-rsid="00370ef4"/>
    </style:style>
    <style:style style:name="P15" style:family="paragraph" style:parent-style-name="Text_20_body">
      <style:text-properties officeooo:paragraph-rsid="003d02b6"/>
    </style:style>
    <style:style style:name="P16" style:family="paragraph" style:parent-style-name="Text_20_body">
      <style:text-properties officeooo:rsid="003d02b6" officeooo:paragraph-rsid="003d02b6"/>
    </style:style>
    <style:style style:name="P17" style:family="paragraph" style:parent-style-name="Text_20_body" style:list-style-name="L2">
      <style:paragraph-properties style:writing-mode="lr-tb" style:writing-mode-automatic="false"/>
      <style:text-properties officeooo:rsid="0045dc3e" officeooo:paragraph-rsid="0045dc3e"/>
    </style:style>
    <style:style style:name="P18" style:family="paragraph" style:parent-style-name="Text_20_body" style:list-style-name="L2">
      <style:paragraph-properties style:writing-mode="lr-tb" style:writing-mode-automatic="false"/>
      <style:text-properties officeooo:rsid="00406d9a" officeooo:paragraph-rsid="00406d9a"/>
    </style:style>
    <style:style style:name="P19" style:family="paragraph" style:parent-style-name="Text_20_body" style:list-style-name="L2">
      <style:paragraph-properties style:writing-mode="lr-tb" style:writing-mode-automatic="false"/>
      <style:text-properties officeooo:rsid="00406d9a" officeooo:paragraph-rsid="00422e00"/>
    </style:style>
    <style:style style:name="P20" style:family="paragraph" style:parent-style-name="Text_20_body" style:list-style-name="L2">
      <style:paragraph-properties style:writing-mode="lr-tb" style:writing-mode-automatic="false"/>
      <style:text-properties officeooo:rsid="003d87c5" officeooo:paragraph-rsid="003e5455"/>
    </style:style>
    <style:style style:name="P21" style:family="paragraph" style:parent-style-name="Text_20_body" style:list-style-name="L2">
      <style:paragraph-properties style:writing-mode="lr-tb" style:writing-mode-automatic="false"/>
      <style:text-properties officeooo:rsid="003d87c5" officeooo:paragraph-rsid="003d87c5"/>
    </style:style>
    <style:style style:name="P22" style:family="paragraph" style:parent-style-name="Text_20_body" style:list-style-name="L2">
      <style:paragraph-properties style:writing-mode="lr-tb" style:writing-mode-automatic="false"/>
      <style:text-properties officeooo:rsid="004eeace" officeooo:paragraph-rsid="004eeace"/>
    </style:style>
    <style:style style:name="P23" style:family="paragraph" style:parent-style-name="Text_20_body" style:list-style-name="L2">
      <style:paragraph-properties style:writing-mode="lr-tb" style:writing-mode-automatic="false"/>
      <style:text-properties officeooo:rsid="004ab1b4" officeooo:paragraph-rsid="004c544b"/>
    </style:style>
    <style:style style:name="P24" style:family="paragraph" style:parent-style-name="Text_20_body" style:list-style-name="L2">
      <style:paragraph-properties style:writing-mode="lr-tb" style:writing-mode-automatic="false"/>
      <style:text-properties officeooo:rsid="004c18f5" officeooo:paragraph-rsid="004c544b"/>
    </style:style>
    <style:style style:name="P25" style:family="paragraph" style:parent-style-name="Text_20_body" style:list-style-name="L2">
      <style:paragraph-properties style:writing-mode="lr-tb" style:writing-mode-automatic="false"/>
      <style:text-properties officeooo:rsid="004a58a8" officeooo:paragraph-rsid="004e4754"/>
    </style:style>
    <style:style style:name="P26" style:family="paragraph" style:parent-style-name="Text_20_body" style:list-style-name="L2">
      <style:paragraph-properties style:writing-mode="lr-tb" style:writing-mode-automatic="false"/>
      <style:text-properties officeooo:rsid="00506945" officeooo:paragraph-rsid="00513abe"/>
    </style:style>
    <style:style style:name="P27" style:family="paragraph" style:parent-style-name="Text_20_body" style:list-style-name="L2">
      <style:paragraph-properties style:writing-mode="lr-tb" style:writing-mode-automatic="false"/>
      <style:text-properties officeooo:rsid="004e4754" officeooo:paragraph-rsid="004e4754"/>
    </style:style>
    <style:style style:name="P28" style:family="paragraph" style:parent-style-name="Text_20_body" style:list-style-name="L2">
      <style:paragraph-properties style:writing-mode="lr-tb" style:writing-mode-automatic="false"/>
      <style:text-properties officeooo:rsid="004a58a8" officeooo:paragraph-rsid="004a58a8"/>
    </style:style>
    <style:style style:name="P29" style:family="paragraph" style:parent-style-name="Text_20_body" style:list-style-name="L2">
      <style:paragraph-properties style:writing-mode="lr-tb" style:writing-mode-automatic="false"/>
      <style:text-properties officeooo:rsid="00422e00" officeooo:paragraph-rsid="00422e00"/>
    </style:style>
    <style:style style:name="P30" style:family="paragraph" style:parent-style-name="Text_20_body" style:list-style-name="L2">
      <style:paragraph-properties style:writing-mode="lr-tb" style:writing-mode-automatic="false"/>
      <style:text-properties officeooo:rsid="004437db" officeooo:paragraph-rsid="004437db"/>
    </style:style>
    <style:style style:name="P31" style:family="paragraph" style:parent-style-name="Text_20_body">
      <style:paragraph-properties style:writing-mode="lr-tb" style:writing-mode-automatic="false"/>
      <style:text-properties officeooo:rsid="00422e00" officeooo:paragraph-rsid="00422e00"/>
    </style:style>
    <style:style style:name="P32" style:family="paragraph" style:parent-style-name="Standard">
      <style:text-properties officeooo:rsid="0013fb8c" officeooo:paragraph-rsid="0013fb8c"/>
    </style:style>
    <style:style style:name="P33" style:family="paragraph" style:parent-style-name="Standard" style:list-style-name="L3">
      <style:text-properties officeooo:rsid="0013fb8c" officeooo:paragraph-rsid="0013fb8c"/>
    </style:style>
    <style:style style:name="P34" style:family="paragraph" style:parent-style-name="Standard" style:list-style-name="L3">
      <style:text-properties officeooo:rsid="00154dd8" officeooo:paragraph-rsid="00154dd8"/>
    </style:style>
    <style:style style:name="P35" style:family="paragraph" style:parent-style-name="Standard" style:list-style-name="L3">
      <style:text-properties officeooo:rsid="00347633" officeooo:paragraph-rsid="00347633"/>
    </style:style>
    <style:style style:name="T1" style:family="text">
      <style:text-properties officeooo:rsid="0026dc23"/>
    </style:style>
    <style:style style:name="T2" style:family="text">
      <style:text-properties officeooo:rsid="001b49e4"/>
    </style:style>
    <style:style style:name="T3" style:family="text">
      <style:text-properties officeooo:rsid="0020fe63"/>
    </style:style>
    <style:style style:name="T4" style:family="text">
      <style:text-properties officeooo:rsid="0027dcb0"/>
    </style:style>
    <style:style style:name="T5" style:family="text">
      <style:text-properties officeooo:rsid="002518c3"/>
    </style:style>
    <style:style style:name="T6" style:family="text">
      <style:text-properties officeooo:rsid="00150316"/>
    </style:style>
    <style:style style:name="T7" style:family="text">
      <style:text-properties officeooo:rsid="0019c37a"/>
    </style:style>
    <style:style style:name="T8" style:family="text">
      <style:text-properties officeooo:rsid="0021d3c5"/>
    </style:style>
    <style:style style:name="T9" style:family="text">
      <style:text-properties officeooo:rsid="0014da12"/>
    </style:style>
    <style:style style:name="T10" style:family="text">
      <style:text-properties officeooo:rsid="002b10af"/>
    </style:style>
    <style:style style:name="T11" style:family="text">
      <style:text-properties officeooo:rsid="0016b262"/>
    </style:style>
    <style:style style:name="T12" style:family="text">
      <style:text-properties officeooo:rsid="001f8a96"/>
    </style:style>
    <style:style style:name="T13" style:family="text">
      <style:text-properties officeooo:rsid="0017ca88"/>
    </style:style>
    <style:style style:name="T14" style:family="text">
      <style:text-properties officeooo:rsid="002ba407"/>
    </style:style>
    <style:style style:name="T15" style:family="text">
      <style:text-properties officeooo:rsid="0023c823"/>
    </style:style>
    <style:style style:name="T16" style:family="text">
      <style:text-properties officeooo:rsid="002fbb87"/>
    </style:style>
    <style:style style:name="T17" style:family="text">
      <style:text-properties officeooo:rsid="00154dd8"/>
    </style:style>
    <style:style style:name="T18" style:family="text">
      <style:text-properties officeooo:rsid="00204ce7"/>
    </style:style>
    <style:style style:name="T19" style:family="text">
      <style:text-properties officeooo:rsid="002d46dd"/>
    </style:style>
    <style:style style:name="T20" style:family="text">
      <style:text-properties officeooo:rsid="00335c7b"/>
    </style:style>
    <style:style style:name="T21" style:family="text">
      <style:text-properties officeooo:rsid="002127af"/>
    </style:style>
    <style:style style:name="T22" style:family="text">
      <style:text-properties officeooo:rsid="001f6852"/>
    </style:style>
    <style:style style:name="T23" style:family="text">
      <style:text-properties officeooo:rsid="00370ef4"/>
    </style:style>
    <style:style style:name="T24" style:family="text">
      <style:text-properties officeooo:rsid="0038d61e"/>
    </style:style>
    <style:style style:name="T25" style:family="text">
      <style:text-properties officeooo:rsid="004437db"/>
    </style:style>
    <style:style style:name="T26" style:family="text">
      <style:text-properties officeooo:rsid="00422e00"/>
    </style:style>
    <style:style style:name="T27" style:family="text">
      <style:text-properties officeooo:rsid="003e5455"/>
    </style:style>
    <style:style style:name="T28" style:family="text">
      <style:text-properties officeooo:rsid="004a1bac"/>
    </style:style>
    <style:style style:name="T29" style:family="text">
      <style:text-properties officeooo:rsid="00526957"/>
    </style:style>
    <style:style style:name="T30" style:family="text">
      <style:text-properties officeooo:rsid="004eeace"/>
    </style:style>
    <style:style style:name="T31" style:family="text">
      <style:text-properties officeooo:rsid="004a58a8"/>
    </style:style>
    <style:style style:name="T32" style:family="text">
      <style:text-properties officeooo:rsid="004ab1b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fault behavior of main.py:</text:p>
      <text:list text:style-name="L1">
        <text:list-item>
          <text:p text:style-name="P2">Read config file for input <text:span text:style-name="T1">directory </text:span>(songs folder) and output <text:span text:style-name="T2">directory</text:span></text:p>
        </text:list-item>
        <text:list-item>
          <text:p text:style-name="P2">Search the songs folder, and for each subfolder <text:span text:style-name="T3">(call this input_subfolder)</text:span>:</text:p>
          <text:list>
            <text:list-item>
              <text:p text:style-name="P3"><text:span text:style-name="T4">Create a subfolder</text:span> in the output directory with the same name as input_subfolder except with the folder_id in the back. Call this output_subfolder.</text:p>
            </text:list-item>
            <text:list-item>
              <text:p text:style-name="P4">Create a<text:span text:style-name="T5">n</text:span> empty <text:span text:style-name="T6">set</text:span> of audio filenames.</text:p>
            </text:list-item>
            <text:list-item>
              <text:p text:style-name="P5">For each .osu file:</text:p>
              <text:list>
                <text:list-item>
                  <text:p text:style-name="P6">Create is_bg_listed <text:span text:style-name="T7">= </text:span>false <text:span text:style-name="T8">(bg stands for background)</text:span></text:p>
                </text:list-item>
                <text:list-item>
                  <text:p text:style-name="P7"><text:span text:style-name="T9">Get </text:span><text:span text:style-name="T10">AudioFilename, </text:span><text:span text:style-name="T9">Title</text:span><text:span text:style-name="T11">, </text:span><text:span text:style-name="T9">Artist, </text:span><text:span text:style-name="T12">Version, </text:span><text:span text:style-name="T11">and </text:span><text:span text:style-name="T13">background image filename </text:span><text:span text:style-name="T8">(bg_filename)</text:span><text:span text:style-name="T13"> </text:span><text:span text:style-name="T9">from .osu file </text:span><text:span text:style-name="T14">(the background image filename requires that 0,0 be at the start of a line in the events block)</text:span></text:p>
                </text:list-item>
                <text:list-item>
                  <text:p text:style-name="P7">If the audio filename already exists in the <text:span text:style-name="T6">set</text:span>, <text:span text:style-name="T15">move to the next .osu file</text:span>. Otherwise, <text:span text:style-name="T2">add it to the set and</text:span> continue.</text:p>
                </text:list-item>
                <text:list-item>
                  <text:p text:style-name="P8">If <text:span text:style-name="T12">title, artist, or version </text:span>are blank / missing, throw an error.</text:p>
                </text:list-item>
                <text:list-item>
                  <text:p text:style-name="P9">Create new variables for title, artist, and version, where illegal filename characters (like “/”) are replaced with “-”.</text:p>
                </text:list-item>
                <text:list-item>
                  <text:p text:style-name="P10">See if artists = various artists. If yes, then set is_various_artists = true.</text:p>
                </text:list-item>
                <text:list-item>
                  <text:p text:style-name="P11"><text:span text:style-name="T16">If not is_various_artists, c</text:span>reate song_filename = <text:span text:style-name="T17">“&lt;Artist&gt; - &lt;Title&gt; </text:span><text:span text:style-name="T18">[</text:span><text:span text:style-name="T17">&lt;</text:span><text:span text:style-name="T18">Version&gt;]</text:span><text:span text:style-name="T17">” </text:span><text:span text:style-name="T19">(the filename legal ones). </text:span><text:span text:style-name="T16">Otherwise, song_filename = audio_filename.</text:span></text:p>
                </text:list-item>
                <text:list-item>
                  <text:p text:style-name="P12">If is_various_artists, <text:span text:style-name="T20">create real_output_subfolder = song_filename without the extension. Otherwise, real_output_subfolder = ouput_subfolder.</text:span></text:p>
                </text:list-item>
                <text:list-item>
                  <text:p text:style-name="P13"><text:span text:style-name="T21">Search for a file in </text:span><text:span text:style-name="T20">real_</text:span><text:span text:style-name="T21">output_subfolder named song_filename. If it doesn’t exist, copy the audio file to </text:span><text:span text:style-name="T20">real_</text:span><text:span text:style-name="T21">output_subfolder, </text:span><text:span text:style-name="T16">and </text:span><text:span text:style-name="T8">change the</text:span> <text:span text:style-name="T17">filename </text:span><text:span text:style-name="T8">to </text:span><text:span text:style-name="T22">song_filename.</text:span></text:p>
                </text:list-item>
                <text:list-item>
                  <text:p text:style-name="P14"><text:span text:style-name="T16">If </text:span><text:span text:style-name="T23">the title metadata is missing from the audio file and it’s not various artists, write the Title to the title field. If the title metadata is missing and it is various artists, write the Version to the title field.</text:span></text:p>
                </text:list-item>
                <text:list-item>
                  <text:p text:style-name="P14"><text:span text:style-name="T24">If the artist metadata is missing from the audio file and it’s not various artists, write the Artist </text:span><text:span text:style-name="T9">to </text:span><text:span text:style-name="T24">the artist field</text:span><text:span text:style-name="T9">.</text:span></text:p>
                </text:list-item>
                <text:list-item>
                  <text:p text:style-name="P6"><text:span text:style-name="T19">If background was listed in the .osu file: s</text:span><text:span text:style-name="T8">earch for a file in </text:span><text:span text:style-name="T20">real_</text:span><text:span text:style-name="T8">output_subfolder named bg_filename. If it doesn’t exist, c</text:span>opy the background image to <text:span text:style-name="T20">real_</text:span><text:span text:style-name="T8">output_subfolder and leave the filename unchanged.</text:span></text:p>
                </text:list-item>
              </text:list>
            </text:list-item>
          </text:list>
        </text:list-item>
      </text:list>
      <text:p text:style-name="Text_20_body"><text:a xlink:type="simple" xlink:href="https://osu.ppy.sh/wiki/en/Client/File_formats/osu_%28file_format%29#backgrounds" text:style-name="Internet_20_link" text:visited-style-name="Visited_20_Internet_20_Link"/></text:p>
      <text:p text:style-name="P15"><text:a xlink:type="simple" xlink:href="https://osu.ppy.sh/wiki/en/Client/File_formats/osu_%28file_format%29#backgrounds" text:style-name="Internet_20_link" text:visited-style-name="Visited_20_Internet_20_Link">https://osu.ppy.sh/wiki/en/Client/File_formats/osu_%28file_format%29#backgrounds</text:a></text:p>
      <text:p text:style-name="P16">Extras:</text:p>
      <text:list text:style-name="L2">
        <text:list-item>
          <text:p text:style-name="P17">Add default configuration values</text:p>
        </text:list-item>
        <text:list-item>
          <text:p text:style-name="P18">Change the configuration to do different things for:</text:p>
          <text:list>
            <text:list-item>
              <text:p text:style-name="P18"><text:soft-page-break/>1 bg and 1 <text:span text:style-name="T25">song</text:span> file <text:span text:style-name="T25">(Most beatmaps)</text:span></text:p>
            </text:list-item>
            <text:list-item>
              <text:p text:style-name="P18">&gt;1 bg and 1 <text:span text:style-name="T25">song</text:span> file <text:span text:style-name="T26">(Probably </text:span><text:span text:style-name="T25">different difficulties use different images)</text:span></text:p>
            </text:list-item>
            <text:list-item>
              <text:p text:style-name="P19">1 bg and &gt;1 <text:span text:style-name="T25">song</text:span> file <text:span text:style-name="T26">(</text:span><text:span text:style-name="T27">Add the version to the title field as well for packs with different rates</text:span><text:span text:style-name="T26">)</text:span></text:p>
            </text:list-item>
            <text:list-item>
              <text:p text:style-name="P18">&gt;1 bg and &gt;1 <text:span text:style-name="T25">song</text:span> file <text:span text:style-name="T26">(Probably map pack)</text:span></text:p>
            </text:list-item>
          </text:list>
        </text:list-item>
        <text:list-item>
          <text:p text:style-name="P20">Add more configuration options:</text:p>
          <text:list>
            <text:list-item>
              <text:p text:style-name="P21">Write metadata only if missing, <text:span text:style-name="T28">never </text:span>write metadata, <text:span text:style-name="T28">always </text:span>write metadata</text:p>
            </text:list-item>
            <text:list-item>
              <text:p text:style-name="P22">Whether to overrite existing files with the same name</text:p>
            </text:list-item>
            <text:list-item>
              <text:p text:style-name="P23">Whether to export the bg as a separate file, <text:span text:style-name="T29">as metadata, or not to export it</text:span></text:p>
            </text:list-item>
            <text:list-item>
              <text:p text:style-name="P24">Whether to export the songs into subfolders or not</text:p>
            </text:list-item>
            <text:list-item>
              <text:p text:style-name="P25">What name to give the subfolders (fstring format)</text:p>
            </text:list-item>
            <text:list-item>
              <text:p text:style-name="P26">What character to replace illegal characters with</text:p>
            </text:list-item>
            <text:list-item>
              <text:p text:style-name="P27">Whether to export the songs into deep subfolders or not</text:p>
            </text:list-item>
            <text:list-item>
              <text:p text:style-name="P25">What name to give the deep subfolders (fstring format)</text:p>
            </text:list-item>
            <text:list-item>
              <text:p text:style-name="P22">What filename to give the songs (fstring format)</text:p>
            </text:list-item>
            <text:list-item>
              <text:p text:style-name="P28">What <text:span text:style-name="T30">title metadata</text:span> to write (fstring format)</text:p>
            </text:list-item>
            <text:list-item>
              <text:p text:style-name="P28">What <text:span text:style-name="T30">artist metadata</text:span> to write (fstring format)</text:p>
            </text:list-item>
            <text:list-item>
              <text:p text:style-name="P29">Configuration options for each of the 4 <text:span text:style-name="T31">different scenarios</text:span> listed above</text:p>
            </text:list-item>
          </text:list>
        </text:list-item>
        <text:list-item>
          <text:p text:style-name="P30">Export only one beatmap</text:p>
        </text:list-item>
      </text:list>
      <text:p text:style-name="P31"/>
      <text:p text:style-name="P32">Questions:</text:p>
      <text:list text:style-name="L3">
        <text:list-item>
          <text:p text:style-name="P33">How to decide which <text:span text:style-name="T32">song / bg </text:span>duplicate to keep?</text:p>
        </text:list-item>
        <text:list-item>
          <text:p text:style-name="P34">Are osu files with videos in them going to be supported in the future?</text:p>
        </text:list-item>
        <text:list-item>
          <text:p text:style-name="P35">How do you deal with different beatmap rat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Noto Sans Devanagari" style:font-family-complex="'Noto Sans Devanagari'"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22:04:22.129821905</meta:creation-date>
    <dc:date>2026-05-10T14:44:52.239324703</dc:date>
    <meta:editing-duration>PT19H42M13S</meta:editing-duration>
    <meta:editing-cycles>49</meta:editing-cycles>
    <meta:generator>LibreOffice/26.2.3.2$Linux_X86_64 LibreOffice_project/620$Build-2</meta:generator>
    <meta:document-statistic meta:table-count="0" meta:image-count="0" meta:object-count="0" meta:page-count="2" meta:paragraph-count="44" meta:word-count="569" meta:character-count="3408" meta:non-whitespace-character-count="2923"/>
  </office:meta>
</office:document-meta>
</file>