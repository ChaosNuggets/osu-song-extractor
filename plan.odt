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1cdda"/>
    </style:style>
    <style:style style:name="P2" style:family="paragraph" style:parent-style-name="Standard" style:list-style-name="L1">
      <style:text-properties officeooo:paragraph-rsid="0011cdda"/>
    </style:style>
    <style:style style:name="P3" style:family="paragraph" style:parent-style-name="Standard" style:list-style-name="L1">
      <style:text-properties officeooo:rsid="0020fe63" officeooo:paragraph-rsid="0020fe63"/>
    </style:style>
    <style:style style:name="P4" style:family="paragraph" style:parent-style-name="Standard" style:list-style-name="L1">
      <style:text-properties officeooo:rsid="0013fb8c" officeooo:paragraph-rsid="0029956f"/>
    </style:style>
    <style:style style:name="P5" style:family="paragraph" style:parent-style-name="Standard" style:list-style-name="L1">
      <style:text-properties officeooo:paragraph-rsid="0014da12"/>
    </style:style>
    <style:style style:name="P6" style:family="paragraph" style:parent-style-name="Standard" style:list-style-name="L1">
      <style:text-properties officeooo:rsid="00198b87" officeooo:paragraph-rsid="00198b87"/>
    </style:style>
    <style:style style:name="P7" style:family="paragraph" style:parent-style-name="Standard" style:list-style-name="L1">
      <style:text-properties officeooo:paragraph-rsid="002b10af"/>
    </style:style>
    <style:style style:name="P8" style:family="paragraph" style:parent-style-name="Standard" style:list-style-name="L1">
      <style:text-properties officeooo:rsid="0017ca88" officeooo:paragraph-rsid="0017ca88"/>
    </style:style>
    <style:style style:name="P9" style:family="paragraph" style:parent-style-name="Standard" style:list-style-name="L1">
      <style:text-properties officeooo:rsid="002d46dd" officeooo:paragraph-rsid="002d46dd"/>
    </style:style>
    <style:style style:name="P10" style:family="paragraph" style:parent-style-name="Standard" style:list-style-name="L1">
      <style:text-properties officeooo:rsid="002fbb87" officeooo:paragraph-rsid="002fbb87"/>
    </style:style>
    <style:style style:name="P11" style:family="paragraph" style:parent-style-name="Standard" style:list-style-name="L1">
      <style:text-properties officeooo:rsid="0019c37a" officeooo:paragraph-rsid="0019c37a"/>
    </style:style>
    <style:style style:name="P12" style:family="paragraph" style:parent-style-name="Standard" style:list-style-name="L1">
      <style:text-properties officeooo:rsid="003172f4" officeooo:paragraph-rsid="003172f4"/>
    </style:style>
    <style:style style:name="P13" style:family="paragraph" style:parent-style-name="Standard" style:list-style-name="L1">
      <style:text-properties officeooo:rsid="00150316" officeooo:paragraph-rsid="002fbb87"/>
    </style:style>
    <style:style style:name="P14" style:family="paragraph" style:parent-style-name="Standard">
      <style:text-properties officeooo:rsid="00126ace" officeooo:paragraph-rsid="00126ace"/>
    </style:style>
    <style:style style:name="P15" style:family="paragraph" style:parent-style-name="Standard">
      <style:text-properties officeooo:rsid="0013fb8c" officeooo:paragraph-rsid="0013fb8c"/>
    </style:style>
    <style:style style:name="P16" style:family="paragraph" style:parent-style-name="Standard" style:list-style-name="L2">
      <style:text-properties officeooo:rsid="0013fb8c" officeooo:paragraph-rsid="0013fb8c"/>
    </style:style>
    <style:style style:name="P17" style:family="paragraph" style:parent-style-name="Standard" style:list-style-name="L2">
      <style:text-properties officeooo:rsid="00154dd8" officeooo:paragraph-rsid="00154dd8"/>
    </style:style>
    <style:style style:name="P18" style:family="paragraph" style:parent-style-name="Standard" style:list-style-name="L2">
      <style:text-properties officeooo:rsid="00347633" officeooo:paragraph-rsid="00347633"/>
    </style:style>
    <style:style style:name="T1" style:family="text">
      <style:text-properties officeooo:rsid="0011cdda"/>
    </style:style>
    <style:style style:name="T2" style:family="text">
      <style:text-properties officeooo:rsid="0021d3c5"/>
    </style:style>
    <style:style style:name="T3" style:family="text">
      <style:text-properties officeooo:rsid="0026dc23"/>
    </style:style>
    <style:style style:name="T4" style:family="text">
      <style:text-properties officeooo:rsid="001b49e4"/>
    </style:style>
    <style:style style:name="T5" style:family="text">
      <style:text-properties officeooo:rsid="0020fe63"/>
    </style:style>
    <style:style style:name="T6" style:family="text">
      <style:text-properties officeooo:rsid="0027dcb0"/>
    </style:style>
    <style:style style:name="T7" style:family="text">
      <style:text-properties officeooo:rsid="002518c3"/>
    </style:style>
    <style:style style:name="T8" style:family="text">
      <style:text-properties officeooo:rsid="00150316"/>
    </style:style>
    <style:style style:name="T9" style:family="text">
      <style:text-properties officeooo:rsid="0014da12"/>
    </style:style>
    <style:style style:name="T10" style:family="text">
      <style:text-properties officeooo:rsid="0019c37a"/>
    </style:style>
    <style:style style:name="T11" style:family="text">
      <style:text-properties officeooo:rsid="002b10af"/>
    </style:style>
    <style:style style:name="T12" style:family="text">
      <style:text-properties officeooo:rsid="0016b262"/>
    </style:style>
    <style:style style:name="T13" style:family="text">
      <style:text-properties officeooo:rsid="001f8a96"/>
    </style:style>
    <style:style style:name="T14" style:family="text">
      <style:text-properties officeooo:rsid="0017ca88"/>
    </style:style>
    <style:style style:name="T15" style:family="text">
      <style:text-properties officeooo:rsid="002ba407"/>
    </style:style>
    <style:style style:name="T16" style:family="text">
      <style:text-properties officeooo:rsid="0023c823"/>
    </style:style>
    <style:style style:name="T17" style:family="text">
      <style:text-properties officeooo:rsid="002fbb87"/>
    </style:style>
    <style:style style:name="T18" style:family="text">
      <style:text-properties officeooo:rsid="00154dd8"/>
    </style:style>
    <style:style style:name="T19" style:family="text">
      <style:text-properties officeooo:rsid="00204ce7"/>
    </style:style>
    <style:style style:name="T20" style:family="text">
      <style:text-properties officeooo:rsid="002d46dd"/>
    </style:style>
    <style:style style:name="T21" style:family="text">
      <style:text-properties officeooo:rsid="00335c7b"/>
    </style:style>
    <style:style style:name="T22" style:family="text">
      <style:text-properties officeooo:rsid="002127af"/>
    </style:style>
    <style:style style:name="T23" style:family="text">
      <style:text-properties officeooo:rsid="001f685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ke a python </text:span><text:span text:style-name="T2">script </text:span><text:span text:style-name="T1">that can:</text:span></text:p>
      <text:list text:style-name="L1">
        <text:list-item>
          <text:p text:style-name="P2">Read config file for input <text:span text:style-name="T3">directory </text:span>(songs folder) and output <text:span text:style-name="T4">directory</text:span></text:p>
        </text:list-item>
        <text:list-item>
          <text:p text:style-name="P2">Search the songs folder, and for each subfolder <text:span text:style-name="T5">(call this input_subfolder)</text:span>:</text:p>
          <text:list>
            <text:list-item>
              <text:p text:style-name="P3"><text:span text:style-name="T6">Create a subfolder</text:span> in the output directory with the same name as input_subfolder except with the folder_id in the back. Call this output_subfolder.</text:p>
            </text:list-item>
            <text:list-item>
              <text:p text:style-name="P4">Create a<text:span text:style-name="T7">n</text:span> empty <text:span text:style-name="T8">set</text:span> of audio filenames.</text:p>
            </text:list-item>
            <text:list-item>
              <text:p text:style-name="P5"><text:span text:style-name="T9">For each .osu file:</text:span></text:p>
              <text:list>
                <text:list-item>
                  <text:p text:style-name="P6">Create is_bg_listed <text:span text:style-name="T10">= </text:span>false <text:span text:style-name="T2">(bg stands for background)</text:span></text:p>
                </text:list-item>
                <text:list-item>
                  <text:p text:style-name="P7"><text:span text:style-name="T9">Get </text:span><text:span text:style-name="T11">AudioFilename, </text:span><text:span text:style-name="T9">Title</text:span><text:span text:style-name="T12">, </text:span><text:span text:style-name="T9">Artist, </text:span><text:span text:style-name="T13">Version, </text:span><text:span text:style-name="T12">and </text:span><text:span text:style-name="T14">background image filename </text:span><text:span text:style-name="T2">(bg_filename)</text:span><text:span text:style-name="T14"> </text:span><text:span text:style-name="T9">from .osu file </text:span><text:span text:style-name="T15">(the background image filename requires that 0,0 be at the start of a line in the events block)</text:span></text:p>
                </text:list-item>
                <text:list-item>
                  <text:p text:style-name="P7">If the audio filename already exists in the <text:span text:style-name="T8">set</text:span>, <text:span text:style-name="T16">move to the next .osu file</text:span>. Otherwise, <text:span text:style-name="T4">add it to the set and</text:span> continue.</text:p>
                </text:list-item>
                <text:list-item>
                  <text:p text:style-name="P8">If <text:span text:style-name="T13">title, artist, or version </text:span>are blank / missing, throw an error.</text:p>
                </text:list-item>
                <text:list-item>
                  <text:p text:style-name="P9">Create new variables for title, artist, and version, where illegal filename characters (like “/”) are replaced with “-”.</text:p>
                </text:list-item>
                <text:list-item>
                  <text:p text:style-name="P10">See if artists = various artists. If yes, then set is_various_artists = true.</text:p>
                </text:list-item>
                <text:list-item>
                  <text:p text:style-name="P11"><text:span text:style-name="T17">If not is_various_artists, c</text:span>reate song_filename = <text:span text:style-name="T18">“&lt;Artist&gt; - &lt;Title&gt; </text:span><text:span text:style-name="T19">[</text:span><text:span text:style-name="T18">&lt;</text:span><text:span text:style-name="T19">Version&gt;]</text:span><text:span text:style-name="T18">” </text:span><text:span text:style-name="T20">(the filename legal ones). </text:span><text:span text:style-name="T17">Otherwise, song_filename = audio_filename.</text:span></text:p>
                </text:list-item>
                <text:list-item>
                  <text:p text:style-name="P12">If is_various_artists, <text:span text:style-name="T21">create real_output_subfolder = song_filename without the extension. Otherwise, real_output_subfolder = ouput_subfolder.</text:span></text:p>
                </text:list-item>
                <text:list-item>
                  <text:p text:style-name="P13"><text:span text:style-name="T22">Search for a file in </text:span><text:span text:style-name="T21">real_</text:span><text:span text:style-name="T22">output_subfolder named song_filename. If it doesn’t exist, copy the audio file to </text:span><text:span text:style-name="T21">real_</text:span><text:span text:style-name="T22">output_subfolder, </text:span><text:span text:style-name="T17">and </text:span><text:span text:style-name="T2">change the</text:span> <text:span text:style-name="T18">filename </text:span><text:span text:style-name="T2">to </text:span><text:span text:style-name="T23">song_filename.</text:span></text:p>
                </text:list-item>
                <text:list-item>
                  <text:p text:style-name="P13"><text:span text:style-name="T17">If not is_various_artists, a</text:span><text:span text:style-name="T9">dd </text:span><text:span text:style-name="T12">the Title and Artist values </text:span><text:span text:style-name="T9">to the </text:span><text:span text:style-name="T12">copied file’s </text:span><text:span text:style-name="T9">metadata. </text:span><text:span text:style-name="T17">Otherwise, leave the metadata unchanged.</text:span></text:p>
                </text:list-item>
                <text:list-item>
                  <text:p text:style-name="P6"><text:span text:style-name="T20">If background was listed in the .osu file: s</text:span><text:span text:style-name="T2">earch for a file in </text:span><text:span text:style-name="T21">real_</text:span><text:span text:style-name="T2">output_subfolder named bg_filename. If it doesn’t exist, c</text:span>opy the background image to <text:span text:style-name="T21">real_</text:span><text:span text:style-name="T2">output_subfolder and leave the filename unchanged.</text:span></text:p>
                </text:list-item>
              </text:list>
            </text:list-item>
          </text:list>
        </text:list-item>
      </text:list>
      <text:p text:style-name="Text_20_body"><text:a xlink:type="simple" xlink:href="https://osu.ppy.sh/wiki/en/Client/File_formats/osu_%28file_format%29#backgrounds" text:style-name="Internet_20_link" text:visited-style-name="Visited_20_Internet_20_Link"/></text:p>
      <text:p text:style-name="Text_20_body"><text:a xlink:type="simple" xlink:href="https://osu.ppy.sh/wiki/en/Client/File_formats/osu_%28file_format%29#backgrounds" text:style-name="Internet_20_link" text:visited-style-name="Visited_20_Internet_20_Link">https://osu.ppy.sh/wiki/en/Client/File_formats/osu_%28file_format%29#backgrounds</text:a></text:p>
      <text:p text:style-name="P14"/>
      <text:p text:style-name="P15">Questions:</text:p>
      <text:list text:style-name="L2">
        <text:list-item>
          <text:p text:style-name="P16">How to decide which duplicate to keep?</text:p>
        </text:list-item>
        <text:list-item>
          <text:p text:style-name="P17">Are osu files with videos in them going to be supported in the future?</text:p>
        </text:list-item>
        <text:list-item>
          <text:p text:style-name="P18">How do you deal with different beatmap rates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SC" style:font-family-asian="'Noto Sans Mono CJK SC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22:04:22.129821905</meta:creation-date>
    <dc:date>2026-05-08T10:54:17.992410176</dc:date>
    <meta:editing-duration>PT3H51M28S</meta:editing-duration>
    <meta:editing-cycles>23</meta:editing-cycles>
    <meta:generator>LibreOffice/26.2.3.2$Linux_X86_64 LibreOffice_project/620$Build-2</meta:generator>
    <meta:document-statistic meta:table-count="0" meta:image-count="0" meta:object-count="0" meta:page-count="1" meta:paragraph-count="22" meta:word-count="322" meta:character-count="2101" meta:non-whitespace-character-count="1820"/>
  </office:meta>
</office:document-meta>
</file>